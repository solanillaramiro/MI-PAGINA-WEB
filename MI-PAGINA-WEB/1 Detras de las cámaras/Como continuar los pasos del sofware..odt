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El Mapa de Ruta Sugerido</text:h>
      <text:h text:style-name="Heading_20_3" text:outline-level="3">1. Animaciones Suaves al Hacer Scroll (Efecto "Wow")</text:h>
      <text:p text:style-name="Text_20_body">Actualmente los elementos aparecen estáticos. Podés usar una librería liviana como <text:span text:style-name="T1">AOS (Animate On Scroll)</text:span> o transiciones simples con CSS para que, a medida que el usuario baje por la página, las tarjetas de especialidades, las fotos de la galería y el perfil profesional aparezcan con un suave desvanecimiento (<text:span text:style-name="Source_20_Text">fade-up</text:span>). Esto da una sensación de fluidez y modernidad tremenda.</text:p>
      <text:h text:style-name="Heading_20_3" text:outline-level="3">2. Galería Dinámica (Lightbox)</text:h>
      <text:p text:style-name="Text_20_body">Ahora las imágenes están fijas en su grilla. Estaría genial que si un cliente hace clic sobre la foto de un tablero eléctrico o de un sistema de refrigeración, esta se abra en pantalla completa (un modal o "lightbox") para que puedan apreciar los detalles técnicos y la prolijidad de tu trabajo a pantalla completa.</text:p>
      <text:h text:style-name="Heading_20_3" text:outline-level="3">3. Sección de Preguntas Frecuentes (FAQ) con Acordeón</text:h>
      <text:p text:style-name="Text_20_body">En servicios de climatización y energía solar, la gente suele tener las mismas dudas: <text:span text:style-name="T2">¿Cuánto se ahorra con paneles solares? ¿Cada cuánto se hace el mantenimiento de un inverter? ¿Entregan certificado para habilitaciones?</text:span> Una sección de preguntas frecuentes con pestañas que se despliegan (acordeón) demuestra mucha autoridad, limpia el diseño y te ahorra responder siempre lo mismo por privado.</text:p>
      <text:h text:style-name="Heading_20_3" text:outline-level="3">4. Reseñas y Testimonios Reales</text:h>
      <text:p text:style-name="Text_20_body">La confianza lo es todo en la ingeniería domiciliaria e industrial. Podés armar un bloque con un diseño limpio que muestre testimonios de clientes ("Excelente service del aire", "Muy prolijo el armado del tablero"). Si además sumás un enlace a tu ficha de <text:span text:style-name="T1">Google Maps (Google My Business)</text:span> para que vean que son calificaciones reales, la credibilidad se dispara al 100%.</text:p>
      <text:h text:style-name="Heading_20_3" text:outline-level="3">5. Optimización de Imágenes y Carga Rápida (SEO Técnico)</text:h>
      <text:p text:style-name="Text_20_body">Cuando vayas a subir tus fotos definitivas, asegurate de:</text:p>
      <text:list text:style-name="L5">
        <text:list-item>
          <text:p text:style-name="P5">Pasarlas por herramientas como <text:span text:style-name="T2">Tinypng</text:span> para que pesen pocos kilobytes sin perder calidad.</text:p>
        </text:list-item>
        <text:list-item>
          <text:p text:style-name="P5">Usar formatos modernos como <text:span text:style-name="Source_20_Text">.webp</text:span> en lugar de <text:span text:style-name="Source_20_Text">.png</text:span> o <text:span text:style-name="Source_20_Text">.jpg</text:span> pesados. Un sitio que carga al instante retiene mucho mejor a los clientes que entran desde el celular con datos móviles en la calle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16T10:50:22.070000000</meta:creation-date>
    <dc:date>2026-06-18T23:50:20.742000000</dc:date>
    <meta:editing-duration>PT14H20M42S</meta:editing-duration>
    <meta:editing-cycles>2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13" meta:word-count="332" meta:character-count="2041" meta:non-whitespace-character-count="1724"/>
  </office:meta>
</office:document-meta>
</file>