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El Mapa de Ruta Sugerido</text:h>
      <text:h text:style-name="Heading_20_3" text:outline-level="3">Paso 1: La sección "Acerca de mí" + Enlaces de contacto (Lo ideal para empezar)</text:h>
      <text:p text:style-name="Text_20_body">Antes de poner comentarios o funciones locas, el usuario necesita saber <text:span text:style-name="T1">quién programó esto y cómo contactarte</text:span>.</text:p>
      <text:list text:style-name="L1">
        <text:list-item>
          <text:p text:style-name="P1"><text:span text:style-name="T1">Por qué empezar aquí:</text:span> Es puramente visual (HTML y CSS). Te sirve para practicar cómo estructurar la información en la pantalla sin meterte todavía con lógica compleja.</text:p>
        </text:list-item>
        <text:list-item>
          <text:p text:style-name="P1"><text:span text:style-name="T1">Qué incluye:</text:span> Una breve descripción tuya y unos botones lindos que lleven a tu LinkedIn, correo o redes.</text:p>
        </text:list-item>
      </text:list>
      <text:h text:style-name="Heading_20_3" text:outline-level="3">Paso 2: El espacio para el Portafolio de Imágenes (Con fotos de prueba)</text:h>
      <text:p text:style-name="Text_20_body">Ya que tienes la estructura de quién eres, abajo podemos armar la galería.</text:p>
      <text:list text:style-name="L2">
        <text:list-item>
          <text:p text:style-name="P2"><text:span text:style-name="T1">Por qué sigue:</text:span> Como vimos antes, dejaremos los contenedores listos usando imágenes genéricas de internet (<text:span text:style-name="T2">placeholders</text:span>).</text:p>
        </text:list-item>
        <text:list-item>
          <text:p text:style-name="P2"><text:span text:style-name="T1">Qué aprendes:</text:span> Aprendes a maquetar en cuadrículas (Grids o Flexbox), una habilidad clave en el diseño web.</text:p>
        </text:list-item>
      </text:list>
      <text:h text:style-name="Heading_20_3" text:outline-level="3">Paso 3: El Modo Oscuro / Modo Claro</text:h>
      <text:p text:style-name="Text_20_body">¡Aquí es donde tu página empieza a cobrar vida!</text:p>
      <text:list text:style-name="L3">
        <text:list-item>
          <text:p text:style-name="P3"><text:span text:style-name="T1">Por qué sigue:</text:span> Para esto sí vamos a necesitar un poquito de <text:span text:style-name="T1">JavaScript</text:span> (el lenguaje que le da lógica y movimiento a la web). Al presionar un botón, el código cambiará los colores de tu página.</text:p>
        </text:list-item>
        <text:list-item>
          <text:p text:style-name="P3"><text:span text:style-name="T1">El impacto:</text:span> Es un cambio súper visual que hace que la página parezca de primer nivel.</text:p>
        </text:list-item>
      </text:list>
      <text:h text:style-name="Heading_20_3" text:outline-level="3">Paso 4: La Zona de Comentarios o Mensajes</text:h>
      <text:p text:style-name="Text_20_body">Dejamos esto para el final porque requiere conectar tu página con un servicio externo.</text:p>
      <text:list text:style-name="L4">
        <text:list-item>
          <text:p text:style-name="P4"><text:span text:style-name="T1">Por qué al final:</text:span> Para que los comentarios se guarden en algún lado, necesitamos usar una herramienta extra (como un formulario que te mande mails o un sistema como Giscus). Es el paso más avanzado de los cuatro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16T10:50:22.070000000</meta:creation-date>
    <dc:date>2026-06-16T10:51:14.876000000</dc:date>
    <meta:editing-duration>PT53S</meta:editing-duration>
    <meta:editing-cycles>1</meta:editing-cycles>
    <meta:document-statistic meta:table-count="0" meta:image-count="0" meta:object-count="0" meta:page-count="1" meta:paragraph-count="16" meta:word-count="277" meta:character-count="1559" meta:non-whitespace-character-count="1305"/>
    <meta:generator>LibreOffice/7.5.4.2$Windows_X86_64 LibreOffice_project/36ccfdc35048b057fd9854c757a8b67ec53977b6</meta:generator>
  </office:meta>
</office:document-meta>
</file>