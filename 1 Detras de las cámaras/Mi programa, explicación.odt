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f5a5" officeooo:paragraph-rsid="0018f5a5"/>
    </style:style>
    <style:style style:name="P2" style:family="paragraph" style:parent-style-name="Standard">
      <style:text-properties officeooo:rsid="0018f5a5" officeooo:paragraph-rsid="001ba56a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8f5a5" officeooo:paragraph-rsid="0018f5a5" style:font-size-asian="20pt" style:font-weight-asian="bold" style:font-size-complex="20pt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808080" loext:opacity="100%" style:text-outline="false" style:text-line-through-style="none" style:text-line-through-type="none" style:text-position="0% 100%" style:font-name="Liberation Serif" fo:font-size="12pt" fo:letter-spacing="normal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italic" style:font-weight-asian="normal" style:font-name-complex="Lucida Sans2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808080" loext:opacity="10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italic" style:font-weight-asian="normal" style:font-name-complex="Lucida Sans2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808080" loext:opacity="100%" fo:font-style="italic" style:font-style-asian="italic" style:font-style-complex="italic" fo:hyphenate="false" loext:hyphenation-no-caps="false" loext:hyphenation-no-last-word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808080" loext:opacity="10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italic" style:font-weight-asian="normal" style:font-name-complex="Lucida Sans2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4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4pt" style:language-asian="zh" style:country-asian="CN" style:font-style-asian="normal" style:font-weight-asian="bold" style:font-name-complex="Lucida Sans2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4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4pt" style:language-asian="zh" style:country-asian="CN" style:font-style-asian="normal" style:font-weight-asian="bold" style:font-name-complex="Lucida Sans2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variant="normal" fo:text-transform="none" style:text-outline="false" style:text-line-through-style="none" style:text-line-through-type="none" style:text-position="0% 100%" style:font-name="Liberation Serif" fo:font-size="12pt" fo:letter-spacing="normal" fo:language="es" fo:country="AR" fo:text-shadow="none" style:text-underline-style="none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name-complex="Lucida Sans2" style:font-size-complex="12pt" style:language-complex="hi" style:country-complex="IN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text-outline="false" style:text-line-through-style="none" style:text-line-through-type="none" style:text-position="0% 100%" style:font-name="Liberation Serif" fo:font-size="12pt" fo:letter-spacing="normal" fo:language="es" fo:country="AR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weight-asian="bold" style:font-name-complex="Lucida Sans2" style:font-size-complex="12pt" style:language-complex="hi" style:country-complex="IN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Liberation Serif" fo:font-size="12pt" fo:letter-spacing="normal" fo:language="es" fo:country="AR" fo:font-style="italic" fo:text-shadow="none" style:text-underline-style="none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italic" style:font-name-complex="Lucida Sans2" style:font-size-complex="12pt" style:language-complex="hi" style:country-complex="IN" style:font-style-complex="italic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Liberation Serif" fo:font-size="12pt" fo:letter-spacing="normal" fo:language="es" fo:country="AR" fo:font-style="italic" fo:text-shadow="none" style:text-underline-style="none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italic" style:font-name-complex="Lucida Sans2" style:font-size-complex="12pt" style:language-complex="hi" style:country-complex="IN" style:font-style-complex="italic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Lucida Sans2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name-complex="Lucida Sans2" style:font-size-complex="12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Liberation Serif" fo:font-size="12pt" fo:letter-spacing="normal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italic" style:font-weight-asian="normal" style:font-name-complex="Lucida Sans2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name-complex="Lucida Sans2" style:font-size-complex="12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Lucida Sans2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4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4pt" style:language-asian="zh" style:country-asian="CN" style:font-style-asian="normal" style:font-weight-asian="bold" style:font-name-complex="Lucida Sans2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solid" svg:stroke-width="0.049cm" svg:stroke-color="#c9211e" draw:marker-start-width="0.42cm" draw:marker-end-width="0.42cm" draw:fill="none" draw:fill-color="#ffffff" draw:textarea-vertical-align="middle" fo:min-height="0.838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049cm" svg:stroke-color="#c9211e" draw:marker-start-width="0.427cm" draw:marker-end="Arrow" draw:marker-end-width="0.25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49cm" svg:stroke-color="#c9211e" draw:marker-start-width="0.42cm" draw:marker-end-width="0.42cm" draw:fill="none" draw:fill-color="#ffffff" draw:textarea-vertical-align="middle" fo:min-height="1.171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solid" svg:stroke-width="0.049cm" svg:stroke-color="#c9211e" draw:marker-start-width="0.42cm" draw:marker-end-width="0.42cm" draw:fill="none" draw:fill-color="#ffffff" draw:textarea-vertical-align="middle" fo:min-height="1.457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solid" svg:stroke-width="0.049cm" svg:stroke-color="#c9211e" draw:marker-start-width="0.42cm" draw:marker-end-width="0.42cm" draw:fill="none" draw:fill-color="#ffffff" draw:textarea-vertical-align="middle" fo:min-height="1.462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solid" svg:stroke-width="0.049cm" svg:stroke-color="#c9211e" draw:marker-start-width="0.42cm" draw:marker-end-width="0.42cm" draw:fill="none" draw:fill-color="#ffffff" draw:textarea-vertical-align="middle" fo:min-height="2.436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svg:stroke-width="0.049cm" svg:stroke-color="#c9211e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svg:stroke-width="0.049cm" svg:stroke-color="#c9211e" draw:marker-start-width="0.42cm" draw:marker-end-width="0.42cm" draw:fill="none" draw:fill-color="#ffffff" draw:textarea-vertical-align="middle" fo:min-height="0.915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solid" svg:stroke-width="0.049cm" svg:stroke-color="#c9211e" draw:marker-start-width="0.42cm" draw:marker-end-width="0.42cm" draw:fill="none" draw:fill-color="#ffffff" draw:textarea-vertical-align="middle" fo:min-height="0.474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solid" svg:stroke-width="0.049cm" svg:stroke-color="#c9211e" draw:marker-start-width="0.42cm" draw:marker-end-width="0.42cm" draw:fill="none" draw:fill-color="#ffffff" draw:textarea-vertical-align="middle" fo:min-height="0.501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solid" svg:stroke-width="0.049cm" svg:stroke-color="#c9211e" draw:marker-start-width="0.42cm" draw:marker-end-width="0.42cm" draw:fill="none" draw:fill-color="#ffffff" draw:textarea-vertical-align="middle" fo:min-height="0.975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solid" svg:stroke-width="0.049cm" svg:stroke-color="#c9211e" draw:marker-start-width="0.42cm" draw:marker-end-width="0.42cm" draw:fill="none" draw:fill-color="#ffffff" draw:textarea-vertical-align="middle" fo:min-height="0.549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stroke="solid" svg:stroke-width="0.049cm" svg:stroke-color="#c9211e" draw:marker-start-width="0.42cm" draw:marker-end-width="0.42cm" draw:fill="none" draw:fill-color="#ffffff" draw:textarea-vertical-align="middle" fo:min-height="0.358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stroke="solid" svg:stroke-width="0.049cm" svg:stroke-color="#c9211e" draw:marker-start-width="0.42cm" draw:marker-end-width="0.42cm" draw:fill="none" draw:fill-color="#ffffff" draw:textarea-vertical-align="middle" fo:min-height="0.769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stroke="solid" svg:stroke-width="0.049cm" svg:stroke-color="#c9211e" draw:marker-start-width="0.42cm" draw:marker-end-width="0.42cm" draw:fill="none" draw:fill-color="#ffffff" draw:textarea-vertical-align="middle" fo:min-height="0.841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stroke="solid" svg:stroke-width="0.049cm" svg:stroke-color="#c9211e" draw:marker-start-width="0.42cm" draw:marker-end-width="0.42cm" draw:fill="none" draw:fill-color="#ffffff" draw:textarea-vertical-align="middle" fo:min-height="0.915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7" style:family="graphic">
      <style:graphic-properties draw:stroke="solid" svg:stroke-width="0.049cm" svg:stroke-color="#c9211e" draw:marker-start-width="0.42cm" draw:marker-end-width="0.42cm" draw:fill="none" draw:fill-color="#ffffff" draw:textarea-vertical-align="middle" fo:min-height="0.76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8" style:family="graphic">
      <style:graphic-properties draw:stroke="solid" svg:stroke-width="0.049cm" svg:stroke-color="#c9211e" draw:marker-start-width="0.42cm" draw:marker-end-width="0.42cm" draw:fill="none" draw:fill-color="#ffffff" draw:textarea-vertical-align="middle" fo:min-height="1.205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9" style:family="graphic">
      <style:graphic-properties draw:stroke="solid" svg:stroke-width="0.049cm" svg:stroke-color="#c9211e" draw:marker-start-width="0.42cm" draw:marker-end-width="0.42cm" draw:fill="none" draw:fill-color="#ffffff" draw:textarea-vertical-align="middle" fo:min-height="0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0" style:family="graphic">
      <style:graphic-properties draw:stroke="solid" svg:stroke-width="0.049cm" svg:stroke-color="#c9211e" draw:marker-start-width="0.42cm" draw:marker-end-width="0.42cm" draw:fill="none" draw:fill-color="#ffffff" draw:textarea-vertical-align="middle" fo:min-height="0.549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1" style:family="graphic">
      <style:graphic-properties draw:stroke="solid" svg:stroke-width="0.049cm" svg:stroke-color="#c9211e" draw:marker-start-width="0.42cm" draw:marker-end-width="0.42cm" draw:fill="none" draw:fill-color="#ffffff" draw:textarea-vertical-align="middle" fo:min-height="1.483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2" style:family="graphic">
      <style:graphic-properties draw:stroke="solid" svg:stroke-width="0.049cm" svg:stroke-color="#c9211e" draw:marker-start-width="0.42cm" draw:marker-end-width="0.42cm" draw:fill="none" draw:fill-color="#ffffff" draw:textarea-vertical-align="middle" fo:min-height="0.769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ithub and Vercel:</text:p>
      <text:p text:style-name="P1"/>
      <text:p text:style-name="P1"><draw:frame text:anchor-type="paragraph" draw:z-index="6" draw:name="Marco de texto 7" draw:style-name="gr16" draw:text-style-name="P8" svg:width="6.58cm" svg:height="1.664cm" svg:x="12.349cm" svg:y="0.289cm"><draw:text-box><text:p text:style-name="P7"><text:span text:style-name="T8">O sea, un registro histórico detallado que rastrea cada modificación realizada en los archivos</text:span></text:p></draw:text-box></draw:frame><draw:frame text:anchor-type="paragraph" draw:z-index="4" draw:name="Marco de texto 5" draw:style-name="gr18" draw:text-style-name="P10" svg:width="2.694cm" svg:height="1.407cm" svg:x="3.15cm" svg:y="0.333cm"><draw:text-box><text:p text:style-name="P9"><text:span text:style-name="T12">Maneja un </text:span><text:span text:style-name="T10">software Git</text:span></text:p></draw:text-box></draw:frame></text:p>
      <text:p text:style-name="P1"><draw:frame text:anchor-type="paragraph" draw:z-index="5" draw:name="Marco de texto 6" draw:style-name="gr17" draw:text-style-name="P10" svg:width="4.292cm" svg:height="1.177cm" svg:x="6.941cm" svg:y="0.086cm"><draw:text-box><text:p text:style-name="P9"><text:span text:style-name="T12">Su función principal es el </text:span><text:span text:style-name="T10">control de versiones</text:span></text:p></draw:text-box></draw:frame></text:p>
      <text:p text:style-name="P1"><draw:line text:anchor-type="paragraph" draw:z-index="12" draw:name="Línea 6" draw:style-name="gr2" draw:text-style-name="P6" svg:x1="1.187cm" svg:y1="0.176cm" svg:x2="3.15cm" svg:y2="0.176cm"><text:p/></draw:line><draw:line text:anchor-type="paragraph" draw:z-index="10" draw:name="Línea 4" draw:style-name="gr2" draw:text-style-name="P6" svg:x1="5.844cm" svg:y1="0.215cm" svg:x2="6.941cm" svg:y2="0.215cm"><text:p/></draw:line><draw:line text:anchor-type="paragraph" draw:z-index="9" draw:name="Línea 3" draw:style-name="gr2" draw:text-style-name="P6" svg:x1="11.232cm" svg:y1="0.159cm" svg:x2="12.349cm" svg:y2="0.159cm"><text:p/></draw:line><draw:line text:anchor-type="paragraph" draw:z-index="14" draw:name="Línea vertical 2" draw:style-name="gr7" draw:text-style-name="P6" svg:x1="1.187cm" svg:y1="0.716cm" svg:x2="1.187cm" svg:y2="0.176cm"><text:p/></draw:line></text:p>
      <text:p text:style-name="P1"><draw:frame text:anchor-type="paragraph" draw:z-index="0" draw:name="Marco de texto 1" draw:style-name="gr22" draw:text-style-name="P14" svg:width="2.08cm" svg:height="0.819cm" svg:x="-0.083cm" svg:y="0.229cm"><draw:text-box><text:p text:style-name="P13"><text:span text:style-name="T11">GitHub</text:span></text:p></draw:text-box></draw:frame></text:p>
      <text:p text:style-name="P1"><draw:frame text:anchor-type="paragraph" draw:z-index="1" draw:name="Marco de texto 2" draw:style-name="gr21" draw:text-style-name="P5" svg:width="2.677cm" svg:height="1.685cm" svg:x="3.15cm" svg:y="0.453cm"><draw:text-box><text:p text:style-name="P4"><text:span text:style-name="T13">Plataforma de </text:span><text:span text:style-name="T6">desarrollo colaborativo</text:span></text:p></draw:text-box></draw:frame></text:p>
      <text:p text:style-name="P1"><draw:frame text:anchor-type="paragraph" draw:z-index="3" draw:name="Marco de texto 4" draw:style-name="gr19" draw:text-style-name="P12" svg:width="6.621cm" svg:height="1.177cm" svg:x="12.367cm" svg:y="0.243cm"><draw:text-box><text:p text:style-name="P11"><text:span text:style-name="T4">O sea, Carpetas virtuales donde se guarda todo el proyecto</text:span></text:p></draw:text-box></draw:frame><draw:frame text:anchor-type="paragraph" draw:z-index="2" draw:name="Marco de texto 3" draw:style-name="gr20" draw:text-style-name="P10" svg:width="4.234cm" svg:height="1.177cm" svg:x="7.056cm" svg:y="0.243cm"><draw:text-box><text:p text:style-name="P9"><text:span text:style-name="T12">Basada en la nube que aloja </text:span><text:span text:style-name="T10">repositorios</text:span></text:p></draw:text-box></draw:frame><draw:line text:anchor-type="paragraph" draw:z-index="13" draw:name="Línea vertical 1" draw:style-name="gr7" draw:text-style-name="P6" svg:x1="1.168cm" svg:y1="0.845cm" svg:x2="1.168cm" svg:y2="0.074cm"><text:p/></draw:line></text:p>
      <text:p text:style-name="P1"><draw:line text:anchor-type="paragraph" draw:z-index="7" draw:name="Línea 1" draw:style-name="gr2" draw:text-style-name="P6" svg:x1="1.168cm" svg:y1="0.358cm" svg:x2="3.151cm" svg:y2="0.358cm"><text:p/></draw:line><draw:line text:anchor-type="paragraph" draw:z-index="11" draw:name="Línea 5" draw:style-name="gr2" draw:text-style-name="P6" svg:x1="5.805cm" svg:y1="0.365cm" svg:x2="7.056cm" svg:y2="0.365cm"><text:p/></draw:line><draw:line text:anchor-type="paragraph" draw:z-index="8" draw:name="Línea 2" draw:style-name="gr2" draw:text-style-name="P6" svg:x1="11.289cm" svg:y1="0.326cm" svg:x2="12.367cm" svg:y2="0.326cm"><text:p/></draw:line></text:p>
      <text:p text:style-name="P1"/>
      <text:p text:style-name="P1"/>
      <text:p text:style-name="P1"><draw:frame text:anchor-type="paragraph" draw:z-index="15" draw:name="Marco de texto 8" draw:style-name="gr15" draw:text-style-name="P5" svg:width="16.453cm" svg:height="1.177cm" svg:x="1.302cm" svg:y="0.173cm"><draw:text-box><text:p text:style-name="P4"><text:span text:style-name="T7">Su alcance es masivo: es el estándar de la industria que usan desde programadores independientes hasta empresas como Google o Microsoft para auditar y resguardar su software.</text:span></text:p></draw:text-box></draw:frame></text:p>
      <text:p text:style-name="P1"/>
      <text:p text:style-name="P1"/>
      <text:p text:style-name="P1"><draw:frame text:anchor-type="paragraph" draw:z-index="32" draw:name="Marco de texto 17" draw:style-name="gr5" draw:text-style-name="P5" svg:width="18.878cm" svg:height="1.664cm" svg:x="0.129cm" svg:y="0.416cm"><draw:text-box><text:p text:style-name="P4"><text:span text:style-name="T6">Hostear el código fuente</text:span><text:span text:style-name="T7"> (</text:span><text:span text:style-name="T4">subir a internet los archivos de programación originales, como el HTML</text:span><text:span text:style-name="T7">): En lugar de tener la web guardada solo en tu computadora con el riesgo de que se borre, la tenés respaldada de forma segura en la nube de GitHub.</text:span></text:p></draw:text-box></draw:frame><text:span text:style-name="T1"/></text:p>
      <text:p text:style-name="P1"/>
      <text:p text:style-name="P1"/>
      <text:p text:style-name="P1"/>
      <text:p text:style-name="P1"/>
      <text:p text:style-name="P1"><draw:frame text:anchor-type="paragraph" draw:z-index="33" draw:name="Marco de texto 18" draw:style-name="gr4" draw:text-style-name="P5" svg:width="18.82cm" svg:height="2.151cm" svg:x="0.187cm" svg:y="0.025cm"><draw:text-box><text:p text:style-name="P4"><text:span text:style-name="T6">Realizar Commits</text:span><text:span text:style-name="T7"> (</text:span><text:span text:style-name="T4">capturas o "fotos" que guardan el estado del código en un momento exacto junto a un mensaje descriptivo</text:span><text:span text:style-name="T7">): Cada vez que agregamos o modificamos una sección (</text:span><text:span text:style-name="T4">como cuando unificamos la sección de garantías</text:span><text:span text:style-name="T7">), hiciste un commit. Esto te permite tener un historial de cambios limpio y, si algo falla, aplicar un Rollback (</text:span><text:span text:style-name="T4">volver el código atrás a una versión anterior que sí funcionaba</text:span><text:span text:style-name="T7">) de manera inmediata.</text:span></text:p></draw:text-box></draw:frame></text:p>
      <text:p text:style-name="P1"/>
      <text:p text:style-name="P1"/>
      <text:p text:style-name="P1"/>
      <text:p text:style-name="P1"/>
      <text:p text:style-name="P1">--------------------------------------------------------------------------------------------------------------------------------------</text:p>
      <text:p text:style-name="P1"><draw:frame text:anchor-type="paragraph" draw:z-index="21" draw:name="Marco de texto 14" draw:style-name="gr9" draw:text-style-name="P8" svg:width="4.638cm" svg:height="1.664cm" svg:x="2.843cm" svg:y="0.139cm"><draw:text-box><text:p text:style-name="P7"><text:span text:style-name="T5">Servicios de computación e infraestructura a través de internet</text:span></text:p></draw:text-box></draw:frame><draw:frame text:anchor-type="paragraph" draw:z-index="34" draw:name="Marco de texto 19" draw:style-name="gr3" draw:text-style-name="P8" svg:width="6.795cm" svg:height="1.664cm" svg:x="11.926cm" svg:y="0.139cm"><draw:text-box><text:p text:style-name="P7"><text:span text:style-name="T5">La acción de publicar de forma automática una web en internet apenas se modifica el código</text:span></text:p></draw:text-box></draw:frame></text:p>
      <text:p text:style-name="P1"/>
      <text:p text:style-name="P1"/>
      <text:p text:style-name="P1"><draw:line text:anchor-type="paragraph" draw:z-index="27" draw:name="Línea 11" draw:style-name="gr2" draw:text-style-name="P6" svg:x1="15.309cm" svg:y1="0.342cm" svg:x2="15.309cm" svg:y2="1.349cm"><text:p/></draw:line><draw:line text:anchor-type="paragraph" draw:z-index="35" draw:name="Línea 13" draw:style-name="gr2" draw:text-style-name="P6" svg:x1="15.309cm" svg:y1="0.342cm" svg:x2="15.309cm" svg:y2="1.349cm"><text:p/></draw:line><draw:line text:anchor-type="paragraph" draw:z-index="36" draw:name="Línea 14" draw:style-name="gr2" draw:text-style-name="P6" svg:x1="5.091cm" svg:y1="0.342cm" svg:x2="5.095cm" svg:y2="1.489cm"><text:p/></draw:line></text:p>
      <text:p text:style-name="P1"/>
      <text:p text:style-name="P2"><draw:frame text:anchor-type="paragraph" draw:z-index="18" draw:name="Marco de texto 11" draw:style-name="gr12" draw:text-style-name="P10" svg:width="4.234cm" svg:height="1.664cm" svg:x="13.155cm" svg:y="0.376cm"><draw:text-box><text:p text:style-name="P9"><text:span text:style-name="T9">Diseñada específicamente para el </text:span><text:span text:style-name="T10">despliegue continuo</text:span></text:p></draw:text-box></draw:frame></text:p>
      <text:p text:style-name="P2"><draw:frame text:anchor-type="paragraph" draw:z-index="20" draw:name="Marco de texto 13" draw:style-name="gr10" draw:text-style-name="P10" svg:width="3.85cm" svg:height="1.177cm" svg:x="3.15cm" svg:y="0.028cm"><draw:text-box><text:p text:style-name="P9"><text:span text:style-name="T9">Es una plataforma de </text:span><text:span text:style-name="T10">Cloud Computing</text:span></text:p></draw:text-box></draw:frame></text:p>
      <text:p text:style-name="P2"><draw:line text:anchor-type="paragraph" draw:z-index="26" draw:name="Línea 10" draw:style-name="gr2" draw:text-style-name="P6" svg:x1="6.999cm" svg:y1="0.21cm" svg:x2="13.155cm" svg:y2="0.205cm"><text:p/></draw:line><draw:line text:anchor-type="paragraph" draw:z-index="28" draw:name="Línea 12" draw:style-name="gr2" draw:text-style-name="P6" svg:x1="1.187cm" svg:y1="0.176cm" svg:x2="3.15cm" svg:y2="0.176cm"><text:p/></draw:line><draw:line text:anchor-type="paragraph" draw:z-index="30" draw:name="Línea vertical 4" draw:style-name="gr7" draw:text-style-name="P6" svg:x1="1.187cm" svg:y1="1.293cm" svg:x2="1.187cm" svg:y2="0.176cm"><text:p/></draw:line></text:p>
      <text:p text:style-name="P2"/>
      <text:p text:style-name="P2"><draw:frame text:anchor-type="paragraph" draw:z-index="16" draw:name="Marco de texto 9" draw:style-name="gr14" draw:text-style-name="P14" svg:width="2.08cm" svg:height="0.819cm" svg:x="-0.12cm" svg:y="0.319cm"><draw:text-box><text:p text:style-name="P13"><text:span text:style-name="T11">Vercel</text:span></text:p></draw:text-box></draw:frame></text:p>
      <text:p text:style-name="P2"/>
      <text:p text:style-name="P2"><draw:frame text:anchor-type="paragraph" draw:z-index="17" draw:name="Marco de texto 10" draw:style-name="gr13" draw:text-style-name="P5" svg:width="3.809cm" svg:height="1.177cm" svg:x="3.191cm" svg:y="0.455cm"><draw:text-box><text:p text:style-name="P4"><text:span text:style-name="T7">funciona mediante una </text:span><text:span text:style-name="T6">Edge Network</text:span></text:p></draw:text-box></draw:frame><draw:line text:anchor-type="paragraph" draw:z-index="29" draw:name="Línea vertical 3" draw:style-name="gr7" draw:text-style-name="P6" svg:x1="1.168cm" svg:y1="1.071cm" svg:x2="1.168cm" svg:y2="0.164cm"><text:p/></draw:line><draw:frame text:anchor-type="paragraph" draw:z-index="22" draw:name="Marco de texto 15" draw:style-name="gr8" draw:text-style-name="P8" svg:width="6.58cm" svg:height="2.151cm" svg:x="9.521cm" svg:y="0.049cm"><draw:text-box><text:p text:style-name="P7"><text:span text:style-name="T8">Procesa y sirve la página web desde el servidor más cercano al usuario para que cargue a velocidad ultra rápida.</text:span></text:p></draw:text-box></draw:frame></text:p>
      <text:p text:style-name="P2"/>
      <text:p text:style-name="P2"><draw:line text:anchor-type="paragraph" draw:z-index="23" draw:name="Línea 7" draw:style-name="gr2" draw:text-style-name="P6" svg:x1="1.168cm" svg:y1="0.097cm" svg:x2="3.191cm" svg:y2="0.097cm"><text:p/></draw:line><draw:line text:anchor-type="paragraph" draw:z-index="24" draw:name="Línea 8" draw:style-name="gr2" draw:text-style-name="P6" svg:x1="6.999cm" svg:y1="0.102cm" svg:x2="9.521cm" svg:y2="0.102cm"><text:p/></draw:line></text:p>
      <text:p text:style-name="P2"><draw:line text:anchor-type="paragraph" draw:z-index="25" draw:name="Línea 9" draw:style-name="gr2" draw:text-style-name="P6" svg:x1="5.017cm" svg:y1="0.171cm" svg:x2="5.017cm" svg:y2="1.143cm"><text:p/></draw:line></text:p>
      <text:p text:style-name="P2"/>
      <text:p text:style-name="P2"><draw:frame text:anchor-type="paragraph" draw:z-index="19" draw:name="Marco de texto 12" draw:style-name="gr11" draw:text-style-name="P12" svg:width="5.389cm" svg:height="1.177cm" svg:x="2.321cm" svg:y="0.169cm"><draw:text-box><text:p text:style-name="P11"><text:span text:style-name="T4">Una red global de servidores distribuidos geográficamente</text:span></text:p></draw:text-box></draw:frame></text:p>
      <text:p text:style-name="P2"/>
      <text:p text:style-name="P2"/>
      <text:p text:style-name="P1"/>
      <text:p text:style-name="P1"><draw:frame text:anchor-type="paragraph" draw:z-index="31" draw:name="Marco de texto 16" draw:style-name="gr6" draw:text-style-name="P5" svg:width="18.857cm" svg:height="2.638cm" svg:x="0.014cm" svg:y="0.101cm"><draw:text-box><text:p text:style-name="P4"><text:span text:style-name="T6">Automatizar el pipeline de CI/CD</text:span><text:span text:style-name="T7"> (</text:span><text:span text:style-name="T4">Integración Continua y Despliegue Continuo / proceso automatizado para que el código pase de GitHub a la web real sin intervención humana</text:span><text:span text:style-name="T7">): Conectaste tu </text:span><text:span text:style-name="T6">GitHub</text:span><text:span text:style-name="T7"> con </text:span><text:span text:style-name="T6">Vercel</text:span><text:span text:style-name="T7">. Entonces, cada vez que hacés un commit en GitHub, Vercel lo detecta, compila (</text:span><text:span text:style-name="T4">traduce y prepara los archivos para que los navegadores los entiendan</text:span><text:span text:style-name="T7">) y actualiza tu página en vivo (</text:span><text:span text:style-name="T4">.vercel.app</text:span><text:span text:style-name="T7">) en cuestión de segundos.</text:span></text:p></draw:text-box></draw:frame></text:p>
      <text:p text:style-name="P1"/>
      <text:p text:style-name="P1"/>
      <text:p text:style-name="P1"/>
      <text:p text:style-name="P1"/>
      <text:p text:style-name="P1"/>
      <text:p text:style-name="P1"><draw:frame text:anchor-type="paragraph" draw:z-index="37" draw:name="Marco de texto 20" draw:style-name="gr1" draw:text-style-name="P5" svg:width="18.857cm" svg:height="1.664cm" svg:x="0.014cm" svg:y="0.376cm"><draw:text-box><text:p text:style-name="P4"><text:span text:style-name="T3">Aprovisionamiento de SSL</text:span><text:span text:style-name="T2"> (</text:span><text:span text:style-name="T4">gestión e instalación automática del certificado de seguridad para que la web use https:// y tenga el candadito de navegación segura</text:span><text:span text:style-name="T2">): Vercel se encarga de esto sin que vos tengas que configurar claves criptográficas complejas a mano.</text:span></text:p></draw:text-box></draw:frame></text:p>
      <text:p text:style-name="P1"/>
      <text:p text:style-name="P1"/>
      <text:p text:style-name="P1"/>
      <text:p text:style-name="P1"><text:soft-page-break/></text:p>
      <text:p text:style-name="P1"><draw:frame text:anchor-type="paragraph" draw:z-index="38" draw:name="Marco de texto 21" draw:style-name="gr1" draw:text-style-name="P5" svg:width="18.857cm" svg:height="7.506cm" svg:x="0.014cm" svg:y="-0.988cm"><draw:text-box><text:p text:style-name="P4"><text:span text:style-name="T2">"Para mi proyecto de NOVA Termodinámica Aplicada, armé una arquitectura moderna. Uso </text:span><text:span text:style-name="T3">GitHub</text:span><text:span text:style-name="T2"> como mi </text:span><text:span text:style-name="T3">repositorio</text:span><text:span text:style-name="T2"> </text:span><text:span text:style-name="T3">central</text:span><text:span text:style-name="T2"> para el control de versiones; ahí voy </text:span><text:span text:style-name="T3">tageando</text:span><text:span text:style-name="T2"> (</text:span><text:span text:style-name="T4">viene del inglés tagging, y que en español adaptamos como "etiquetar"</text:span><text:span text:style-name="T2">) y haciendo </text:span><text:span text:style-name="T3">commits</text:span><text:span text:style-name="T2"> de cada cambio del código fuente para tener un respaldo auditable y seguro (</text:span><text:span text:style-name="T4">auditable es organizado de tal manera que cualquier persona experta como Maxi, puede entrar y revisar, verificar y comprobar paso a paso la historia de cómo se construyó el proyecto, asegurando que no hay trampas, errores ocultos o códigos inventados. Que le digas que tu respaldo es auditable significa que tu código tiene una estructura profesional. Demuestra que no copiaste y pegaste cosas al azar en un archivo suelto en tu computadora, sino que usaste un flujo de trabajo transparente, limpio y ordenado que resiste cualquier inspección técnica.</text:span><text:span text:style-name="T2">).</text:span></text:p><text:p text:style-name="P4"><text:span text:style-name="T2"/></text:p><text:p text:style-name="P4"><text:span text:style-name="T2">A su vez, tengo ese </text:span><text:span text:style-name="T3">repositorio</text:span><text:span text:style-name="T2"> conectado directamente a </text:span><text:span text:style-name="T3">Vercel</text:span><text:span text:style-name="T2"> para manejar el </text:span><text:span text:style-name="T3">pipeline de CI/CD</text:span><text:span text:style-name="T2"> (</text:span><text:span text:style-name="T4">despliegue continuo</text:span><text:span text:style-name="T2">). Así, cada vez que hago un push (</text:span><text:span text:style-name="T4">subir los cambios</text:span><text:span text:style-name="T2">), Vercel detecta el cambio, hace el build (</text:span><text:span text:style-name="T4">compilación</text:span><text:span text:style-name="T2">) automáticamente y distribuye la web en su </text:span><text:span text:style-name="T3">Edge Network</text:span><text:span text:style-name="T2"> con el certificado </text:span><text:span text:style-name="T3">SSL</text:span><text:span text:style-name="T2"> ya aprovisionado. Elegí Vercel porque comercialmente es ultra estable, rapidísimo, y me evita tener que renegar configurando servidores tradicionales por FTP."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19T23:50:51.191000000</meta:creation-date>
    <dc:date>2026-06-20T00:50:14.387000000</dc:date>
    <meta:editing-duration>PT5M2S</meta:editing-duration>
    <meta:editing-cycles>1</meta:editing-cycles>
    <meta:document-statistic meta:table-count="0" meta:image-count="0" meta:object-count="0" meta:page-count="2" meta:paragraph-count="2" meta:word-count="4" meta:character-count="152" meta:non-whitespace-character-count="150"/>
    <meta:generator>LibreOffice/7.5.4.2$Windows_X86_64 LibreOffice_project/36ccfdc35048b057fd9854c757a8b67ec53977b6</meta:generator>
  </office:meta>
</office:document-meta>
</file>